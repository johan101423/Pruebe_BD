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876" officeooo:paragraph-rsid="00013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DO INICIAL </text:p>
      <text:p text:style-name="P1"><text:s/>en la primera hoja que me entregaron me dieron algo desordenado y repetidos </text:p>
      <text:p text:style-name="P1"/>
      <text:p text:style-name="P1">PROBLEMAS ENCONTRADOS </text:p>
      <text:p text:style-name="P1">encontre varios problemas como lo son los datos repetidos <text:s/>sin ordenen la escritura sin respetar las mayuscula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9T12:32:38.841146389</meta:creation-date>
    <dc:date>2026-07-09T15:50:32.126573110</dc:date>
    <meta:editing-duration>PT3H6M30S</meta:editing-duration>
    <meta:editing-cycles>1</meta:editing-cycles>
    <meta:document-statistic meta:table-count="0" meta:image-count="0" meta:object-count="0" meta:page-count="1" meta:paragraph-count="4" meta:word-count="34" meta:character-count="226" meta:non-whitespace-character-count="190"/>
    <meta:generator>LibreOffice/24.2.7.2$Linux_X86_64 LibreOffice_project/420$Build-2</meta:generator>
  </office:meta>
</office:document-meta>
</file>